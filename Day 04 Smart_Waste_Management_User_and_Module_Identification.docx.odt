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Heading_20_1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rt Waste Management System</text:p>
      <text:p text:style-name="Heading_20_2">User and Module Identification</text:p>
      <text:p text:style-name="Standard"><text:line-break/>Definition:<text:line-break/>User and Module Identification is the process of identifying the users who interact with the system and dividing the system into different modules based on their functions.</text:p>
      <text:p text:style-name="Standard">User Identification:</text:p>
      <text:p text:style-name="Standard">1. User / Citizen<text:line-break/>Description:<text:line-break/>The user reports waste-related problems using the system.</text:p>
      <text:p text:style-name="Standard">Responsibilities:<text:line-break/>- Register account<text:line-break/>- Login to system<text:line-break/>- Submit waste complaint<text:line-break/>- Add location details<text:line-break/>- Upload waste image<text:line-break/>- View complaint status<text:line-break/>- Track complaint progress</text:p>
      <text:p text:style-name="Standard">2. Admin / Waste Management Authority<text:line-break/>Description:<text:line-break/>Admin manages complaints and monitors the waste management process.</text:p>
      <text:p text:style-name="Standard">Responsibilities:<text:line-break/>- Admin login<text:line-break/>- View complaints<text:line-break/>- Check complaint details<text:line-break/>- Verify complaints<text:line-break/>- Update complaint status<text:line-break/>- Manage user information</text:p>
      <text:p text:style-name="Standard">Module Identification:</text:p>
      <text:p text:style-name="Standard">Module 1: User Authentication Module<text:line-break/>Purpose:<text:line-break/>Provides secure access to users.</text:p>
      <text:p text:style-name="Standard">Functions:<text:line-break/>- Registration<text:line-break/>- Login<text:line-break/>- Logout</text:p>
      <text:p text:style-name="Standard">Module 2: Complaint Management Module<text:line-break/>Purpose:<text:line-break/>Handles waste complaints.</text:p>
      <text:p text:style-name="Standard">Functions:<text:line-break/>- Submit complaint<text:line-break/>- Add location<text:line-break/>- Select waste type<text:line-break/>- Upload image<text:line-break/>- Generate complaint ID</text:p>
      <text:p text:style-name="Standard">Module 3: Complaint Tracking Module<text:line-break/>Purpose:<text:line-break/>Allows users to check complaint progress.</text:p>
      <text:p text:style-name="Standard">Functions:<text:line-break/>- View complaint history<text:line-break/>- Track status</text:p>
      <text:p text:style-name="Standard">Status:<text:line-break/>- Pending<text:line-break/>- Processing<text:line-break/>- Completed</text:p>
      <text:p text:style-name="Standard">Module 4: Admin Management Module<text:line-break/>Purpose:<text:line-break/>Helps admin control the system.</text:p>
      <text:p text:style-name="Standard">Functions:<text:line-break/>- View complaints<text:line-break/>- Update status<text:line-break/>- Manage reports</text:p>
      <text:p text:style-name="Standard">Module 5: Database Management Module<text:line-break/>Purpose:<text:line-break/>Stores and manages system data.</text:p>
      <text:p text:style-name="Standard">Stores:<text:line-break/>- User details<text:line-break/>- Complaint details<text:line-break/>- Status information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0" meta:word-count="233" meta:character-count="1562" meta:non-whitespace-character-count="1347"/>
    <meta:generator>LibreOfficeDev/6.0.5.2$Linux_X86_64 LibreOffice_project/</meta:generator>
  </office:meta>
</office:document-meta>
</file>