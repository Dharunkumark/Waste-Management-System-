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2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" style:family="paragraph" style:parent-style-name="Standard" style:list-style-name="WWNum1">
      <style:paragraph-properties fo:margin-left="0.2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" style:family="paragraph" style:parent-style-name="Heading_20_1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style:font-name-asian="Cambria1" style:font-size-asian="11pt" style:font-style-asian="normal" style:font-weight-asian="normal" style:font-name-complex="Cambria1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vigation and Form Design</text:p>
      <text:p text:style-name="Standard">Project: Smart Waste Management System</text:p>
      <text:p text:style-name="Heading_20_2">1. Navigation Design</text:p>
      <text:p text:style-name="Standard"><text:line-break/>┌──────────────────────────────────────────────────────────┐<text:line-break/>│ SMART WASTE MANAGEMENT SYSTEM <text:s text:c="15"/>Admin ▼ <text:s text:c="4"/>│<text:line-break/>├──────────────────────────────────────────────────────────┤<text:line-break/>│ Dashboard | Bins | Alerts | Reports | Settings | Logout │<text:line-break/>└──────────────────────────────────────────────────────────┘<text:line-break/></text:p>
      <text:p text:style-name="Standard">Navigation Menu Description:</text:p>
      <text:list xml:id="list349485871" text:style-name="WWNum1">
        <text:list-item>
          <text:p text:style-name="P1"><text:span text:style-name="T1">Dashboard – Overview of system status</text:span></text:p>
        </text:list-item>
        <text:list-item>
          <text:p text:style-name="P1"><text:span text:style-name="T1">Bins – View and manage waste bins</text:span></text:p>
        </text:list-item>
        <text:list-item>
          <text:p text:style-name="P1"><text:span text:style-name="T1">Alerts – Check overflow and warning alerts</text:span></text:p>
        </text:list-item>
        <text:list-item>
          <text:p text:style-name="P1"><text:span text:style-name="T1">Reports – View waste collection reports</text:span></text:p>
        </text:list-item>
        <text:list-item>
          <text:p text:style-name="P1"><text:span text:style-name="T1">Settings – Manage user preferences</text:span></text:p>
        </text:list-item>
        <text:list-item>
          <text:p text:style-name="P2"><text:span text:style-name="T1">Logout – Securely exit the system</text:span></text:p>
        </text:list-item>
      </text:list>
      <text:p text:style-name="Heading_20_2">2. Bin Registration Form Design</text:p>
      <text:p text:style-name="Standard"><text:line-break/>┌──────────────────────────────────────────────┐<text:line-break/>│ Add New Bin <text:s text:c="33"/>│<text:line-break/>├──────────────────────────────────────────────┤<text:line-break/>│ Bin ID <text:s text:c="7"/>[_____________] <text:s text:c="15"/>│<text:line-break/>│ Location <text:s text:c="5"/>[_____________] <text:s text:c="15"/>│<text:line-break/>│ Capacity (%) <text:s/>[_____________] <text:s text:c="15"/>│<text:line-break/>│ Status <text:s text:c="7"/>[Normal ▼] <text:s text:c="20"/>│<text:line-break/>│ <text:s text:c="46"/><text:line-break/>│ [ Save ] <text:s text:c="5"/>[ Reset ] <text:s text:c="21"/>│<text:line-break/>└──────────────────────────────────────────────┘<text:line-break/></text:p>
      <text:p text:style-name="Heading_20_2">3. Alert Form Design</text:p>
      <text:p text:style-name="Standard"><text:line-break/>┌──────────────────────────────────────────────┐<text:line-break/>│ Alert Management <text:s text:c="28"/>│<text:line-break/>├──────────────────────────────────────────────┤<text:line-break/>│ Bin ID <text:s text:c="7"/>[_____________] <text:s text:c="15"/>│<text:line-break/>│ Alert Type <text:s text:c="3"/>[Dropdown ▼] <text:s text:c="18"/>│<text:line-break/>│ Message <text:s text:c="6"/>[_____________] <text:s text:c="15"/>│<text:line-break/>│ <text:s text:c="46"/><text:line-break/>│ [ Submit ] <text:s text:c="3"/>[ Cancel ] <text:s text:c="20"/>│<text:line-break/>└──────────────────────────────────────────────┘<text:line-break/></text:p>
      <text:p text:style-name="Heading_20_2">4. Report Search Form Design</text:p>
      <text:p text:style-name="Standard"><text:line-break/>┌──────────────────────────────────────────────┐<text:line-break/>│ Generate Reports <text:s text:c="28"/>│<text:line-break/>├──────────────────────────────────────────────┤<text:line-break/>│ Start Date <text:s text:c="3"/>[__/__/____] <text:s text:c="18"/>│<text:line-break/>│ End Date <text:s text:c="5"/>[__/__/____] <text:s text:c="18"/>│<text:line-break/>│ <text:s text:c="46"/><text:line-break/>│ [ Generate Report ] <text:s text:c="25"/>│<text:line-break/>└──────────────────────────────────────────────┘<text:line-break/></text:p>
      <text:p text:style-name="Heading_20_2">5. Design Guidelines</text:p>
      <text:list xml:id="list73749629248033" text:continue-numbering="true" text:style-name="WWNum1">
        <text:list-item>
          <text:p text:style-name="P1"><text:span text:style-name="T1">Responsive layout using Bootstrap</text:span></text:p>
        </text:list-item>
        <text:list-item>
          <text:p text:style-name="P1"><text:span text:style-name="T1">Simple and user-friendly navigation</text:span></text:p>
        </text:list-item>
        <text:list-item>
          <text:p text:style-name="P1"><text:span text:style-name="T1">Input validation for all forms</text:span></text:p>
        </text:list-item>
        <text:list-item>
          <text:p text:style-name="P1"><text:span text:style-name="T1">Green color theme for sustainability</text:span></text:p>
        </text:list-item>
        <text:list-item>
          <text:p text:style-name="P2"><text:span text:style-name="T1">Consistent button and form stylin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6091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text-properties fo:color="#4f81bd"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3" meta:word-count="212" meta:character-count="2239" meta:non-whitespace-character-count="1531"/>
    <meta:generator>LibreOfficeDev/6.0.5.2$Linux_X86_64 LibreOffice_project/</meta:generator>
  </office:meta>
</office:document-meta>
</file>