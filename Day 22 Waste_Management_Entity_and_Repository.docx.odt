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ste Management System<text:line-break/>Entity and Repository Creation</text:p>
      <text:p text:style-name="Standard"><text:span text:style-name="T1">Entity Creation - Waste.java<text:line-break/></text:span><text:line-break/>@Entity<text:line-break/>@Table(name="waste")<text:line-break/>public class Waste {<text:line-break/> <text:s text:c="3"/>@Id<text:line-break/> <text:s text:c="3"/>@GeneratedValue(strategy = GenerationType.IDENTITY)<text:line-break/> <text:s text:c="3"/>private int id;<text:line-break/> <text:s text:c="3"/>private String wasteType;<text:line-break/> <text:s text:c="3"/>private String location;<text:line-break/> <text:s text:c="3"/>private double weight;<text:line-break/> <text:s text:c="3"/>private String status;<text:line-break/> <text:s text:c="3"/>// Constructors, Getters and Setters<text:line-break/>}<text:line-break/></text:p>
      <text:p text:style-name="Standard"><text:span text:style-name="T1">Repository Creation - WasteRepository.java<text:line-break/></text:span><text:line-break/>@Repository<text:line-break/>public interface WasteRepository extends JpaRepository&lt;Waste, Integer&gt; {<text:line-break/>}<text:line-break/></text:p>
      <text:p text:style-name="Heading_20_2">Explanation</text:p>
      <text:p text:style-name="Standard">- @Entity maps the class to a database table.<text:line-break/>- @Id defines the primary key.<text:line-break/>- @GeneratedValue generates IDs automatically.<text:line-break/>- JpaRepository provides CRUD methods like save(), findAll(), findById(), and deleteById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87" meta:character-count="731" meta:non-whitespace-character-count="613"/>
    <meta:generator>LibreOfficeDev/6.0.5.2$Linux_X86_64 LibreOffice_project/</meta:generator>
  </office:meta>
</office:document-meta>
</file>