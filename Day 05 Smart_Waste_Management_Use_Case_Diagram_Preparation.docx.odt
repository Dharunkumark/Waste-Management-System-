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Heading_20_1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 Waste Management System</text:p>
      <text:p text:style-name="Heading_20_2">Use Case Diagram Preparation</text:p>
      <text:p text:style-name="Heading_20_3">Definition</text:p>
      <text:p text:style-name="Standard">A Use Case Diagram shows the interaction between users (actors) and the functions (use cases) provided by a system.</text:p>
      <text:p text:style-name="Heading_20_3">Actors</text:p>
      <text:p text:style-name="Standard">1. User / Citizen<text:line-break/>The user interacts with the system to report and track waste complaints.<text:line-break/><text:line-break/>2. Admin<text:line-break/>The admin manages complaints and updates information.</text:p>
      <text:p text:style-name="Heading_20_3">User Use Cases</text:p>
      <text:p text:style-name="Standard">- Register Account<text:line-break/>- Login<text:line-break/>- Submit Complaint<text:line-break/>- Upload Waste Image<text:line-break/>- View Complaint Status<text:line-break/>- Track Complaint<text:line-break/>- View Complaint History</text:p>
      <text:p text:style-name="Heading_20_3">Admin Use Cases</text:p>
      <text:p text:style-name="Standard">- Admin Login<text:line-break/>- View Complaints<text:line-break/>- Verify Complaint<text:line-break/>- Update Complaint Status<text:line-break/>- Manage Users<text:line-break/>- Generate Reports</text:p>
      <text:p text:style-name="Heading_20_3">Use Case Flow</text:p>
      <text:p text:style-name="Standard">User -&gt; Register/Login -&gt; Submit Complaint -&gt; Upload Image -&gt; Track Status<text:line-break/><text:line-break/>Admin -&gt; Login -&gt; View Complaint -&gt; Verify -&gt; Update Status -&gt; Generate Repor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none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131" meta:character-count="782" meta:non-whitespace-character-count="661"/>
    <meta:generator>LibreOfficeDev/6.0.5.2$Linux_X86_64 LibreOffice_project/</meta:generator>
  </office:meta>
</office:document-meta>
</file>