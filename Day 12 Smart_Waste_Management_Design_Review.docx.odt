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ign Review Document</text:p>
      <text:p text:style-name="Standard">Project: Smart Waste Management System</text:p>
      <text:p text:style-name="Heading_20_2">1. Overview</text:p>
      <text:p text:style-name="Standard">The Smart Waste Management System is designed to monitor waste bin levels in real time, generate alerts for full bins, and provide an administrator dashboard for efficient waste management.</text:p>
      <text:p text:style-name="Heading_20_2">2. Design Components Reviewed</text:p>
      <text:list xml:id="list981147832" text:style-name="WWNum1">
        <text:list-item>
          <text:p text:style-name="P1"><text:span text:style-name="T1">System Architecture Design</text:span></text:p>
        </text:list-item>
        <text:list-item>
          <text:p text:style-name="P1"><text:span text:style-name="T1">Database Schema Design</text:span></text:p>
        </text:list-item>
        <text:list-item>
          <text:p text:style-name="P1"><text:span text:style-name="T1">UI Wireframe Design</text:span></text:p>
        </text:list-item>
        <text:list-item>
          <text:p text:style-name="P1"><text:span text:style-name="T1">Login Page Design</text:span></text:p>
        </text:list-item>
        <text:list-item>
          <text:p text:style-name="P1"><text:span text:style-name="T1">Dashboard Design</text:span></text:p>
        </text:list-item>
        <text:list-item>
          <text:p text:style-name="P1"><text:span text:style-name="T1">Navigation Design</text:span></text:p>
        </text:list-item>
        <text:list-item>
          <text:p text:style-name="P2"><text:span text:style-name="T1">Form Design</text:span></text:p>
        </text:list-item>
      </text:list>
      <text:p text:style-name="Heading_20_2">3. Strengths of the Design</text:p>
      <text:list xml:id="list73824160379485" text:continue-numbering="true" text:style-name="WWNum1">
        <text:list-item>
          <text:p text:style-name="P1"><text:span text:style-name="T1">Simple and user-friendly interface</text:span></text:p>
        </text:list-item>
        <text:list-item>
          <text:p text:style-name="P1"><text:span text:style-name="T1">Well-structured database schema</text:span></text:p>
        </text:list-item>
        <text:list-item>
          <text:p text:style-name="P1"><text:span text:style-name="T1">Easy navigation between modules</text:span></text:p>
        </text:list-item>
        <text:list-item>
          <text:p text:style-name="P1"><text:span text:style-name="T1">Real-time monitoring capability</text:span></text:p>
        </text:list-item>
        <text:list-item>
          <text:p text:style-name="P1"><text:span text:style-name="T1">Suitable for one-month project implementation</text:span></text:p>
        </text:list-item>
        <text:list-item>
          <text:p text:style-name="P2"><text:span text:style-name="T1">Scalable for future enhancements</text:span></text:p>
        </text:list-item>
      </text:list>
      <text:p text:style-name="Heading_20_2">4. Areas for Improvement</text:p>
      <text:list xml:id="list73825347190860" text:continue-numbering="true" text:style-name="WWNum1">
        <text:list-item>
          <text:p text:style-name="P1"><text:span text:style-name="T1">Add graphical analytics for waste trends</text:span></text:p>
        </text:list-item>
        <text:list-item>
          <text:p text:style-name="P1"><text:span text:style-name="T1">Implement role-based user access</text:span></text:p>
        </text:list-item>
        <text:list-item>
          <text:p text:style-name="P1"><text:span text:style-name="T1">Add GPS-based bin location tracking</text:span></text:p>
        </text:list-item>
        <text:list-item>
          <text:p text:style-name="P1"><text:span text:style-name="T1">Integrate SMS or email notifications</text:span></text:p>
        </text:list-item>
        <text:list-item>
          <text:p text:style-name="P2"><text:span text:style-name="T1">Improve mobile responsiveness</text:span></text:p>
        </text:list-item>
      </text:list>
      <text:p text:style-name="Heading_20_2"><text:soft-page-break/>5. Design Validation</text:p>
      <text:p text:style-name="Standard">The proposed design meets the functional requirements of the project. The database supports data storage, the dashboard provides monitoring capabilities, and the alert module helps prevent waste overflow.</text:p>
      <text:p text:style-name="Heading_20_2">6. Conclusion</text:p>
      <text:p text:style-name="Standard">The design is feasible, practical, and appropriate for a one-month Smart Waste Management System project using Python, Flask, and My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187" meta:character-count="1234" meta:non-whitespace-character-count="1094"/>
    <meta:generator>LibreOfficeDev/6.0.5.2$Linux_X86_64 LibreOffice_project/</meta:generator>
  </office:meta>
</office:document-meta>
</file>