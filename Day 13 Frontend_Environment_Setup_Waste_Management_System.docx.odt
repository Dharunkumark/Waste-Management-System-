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Heading_20_1"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ontend Environment Setup</text:p>
      <text:p text:style-name="Standard"><text:line-break/>Project Title: Real-Life Solution for Waste Management System</text:p>
      <text:p text:style-name="Standard">1. Introduction<text:line-break/>Frontend environment setup is the process of preparing the required tools, software, and frameworks to develop the user interface of the Waste Management System. It helps to create interactive and user-friendly web pages for users and administrators.</text:p>
      <text:p text:style-name="Standard">2. Frontend Technologies Used</text:p>
      <text:p text:style-name="Standard">HTML (HyperText Markup Language)<text:line-break/>HTML is used to create the structure of web pages including forms, buttons, tables, and layouts.</text:p>
      <text:p text:style-name="Standard">CSS (Cascading Style Sheets)<text:line-break/>CSS is used for designing the application interface by adding styles, colors, spacing, and responsive layouts.</text:p>
      <text:p text:style-name="Standard">JavaScript<text:line-break/>JavaScript is used to add dynamic features, validations, and user interactions.</text:p>
      <text:p text:style-name="Standard">React.js (if used)<text:line-break/>React.js is used to create reusable UI components and build interactive web applications.</text:p>
      <text:p text:style-name="Standard">3. Development Tools</text:p>
      <text:p text:style-name="Standard">Visual Studio Code:<text:line-break/>Used for writing and managing frontend source code.</text:p>
      <text:p text:style-name="Standard">Google Chrome:<text:line-break/>Used for testing and debugging the application.</text:p>
      <text:p text:style-name="Standard">Node.js and npm:<text:line-break/>Used to run the frontend environment and manage required packages.</text:p>
      <text:p text:style-name="Standard">4. Frontend Setup Steps</text:p>
      <text:p text:style-name="Standard">1. Install Visual Studio Code.<text:line-break/>2. Install Node.js and npm.<text:line-break/>3. Create the frontend project.<text:line-break/>4. Install required dependencies.<text:line-break/>5. Create folders for components, pages, and assets.<text:line-break/>6. Design the user interface.<text:line-break/>7. Connect frontend with backend.<text:line-break/>8. Test the application.</text:p>
      <text:p text:style-name="Standard">5. Frontend Modules</text:p>
      <text:p text:style-name="Standard">- Login and Registration Page<text:line-break/>- Dashboard Interface<text:line-break/>- Waste Report Form<text:line-break/>- Waste Collection Tracking<text:line-break/>- Search and Filter Features<text:line-break/>- Admin Management Panel</text:p>
      <text:p text:style-name="Standard">6. Conclusion</text:p>
      <text:p text:style-name="Standard">The frontend environment setup provides a foundation for developing the Waste Management System. It helps in creating an efficient, responsive, and user-friendly applicatio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none" style:letter-kerning="false" style:font-name-asian="Cambria1" style:font-size-asian="11pt" style:language-asian="zh" style:country-asian="CN" style:font-name-complex="Cambr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none" style:letter-kerning="false" style:font-name-asian="Cambria1" style:font-size-asian="11pt" style:language-asian="zh" style:country-asian="CN" style:font-name-complex="Cambr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366091"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Heading_20_4" style:display-name="Heading 4"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tyle="italic" fo:font-weight="bold" style:font-name-asian="Calibri1" style:font-family-asian="Calibri" style:font-family-generic-asian="system" style:font-pitch-asian="variable" style:font-style-asian="italic" style:font-weight-asian="bold" style:font-name-complex="Calibri1" style:font-family-complex="Calibri" style:font-family-generic-complex="system" style:font-pitch-complex="variable" style:font-style-complex="italic" style:font-weight-complex="bold"/>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243f61"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243f61"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2083in" loext:contextual-spacing="fals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style:font-name-asian="Calibri1" style:font-family-asian="Calibri" style:font-family-generic-asian="system" style:font-pitch-asian="variable" style:font-size-asian="26pt" style:font-name-complex="Calibri1" style:font-family-complex="Calibri" style:font-family-generic-complex="system" style:font-pitch-complex="variable" style:font-size-complex="26pt"/>
    </style:style>
    <style:style style:name="Subtitle" style:family="paragraph" style:parent-style-name="normal" style:next-style-name="Standard" style:default-outline-level="" style:class="chapter">
      <style:text-properties fo:color="#4f81bd" style:font-name="Calibri" fo:font-family="Calibri" style:font-family-generic="roman" style:font-pitch="variable" fo:font-size="12pt" fo:font-style="italic" style:font-name-asian="Calibri1" style:font-family-asian="Calibri" style:font-family-generic-asian="system" style:font-pitch-asian="variable" style:font-size-asian="12pt" style:font-style-asian="italic" style:font-name-complex="Calibri1" style:font-family-complex="Calibri" style:font-family-generic-complex="system" style:font-pitch-complex="variable" style:font-size-complex="12pt"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8" meta:word-count="256" meta:character-count="1734" meta:non-whitespace-character-count="1494"/>
    <meta:generator>LibreOfficeDev/6.0.5.2$Linux_X86_64 LibreOffice_project/</meta:generator>
  </office:meta>
</office:document-meta>
</file>