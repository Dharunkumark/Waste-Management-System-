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Noto Sans Symbols" svg:font-family="'Noto Sans Symbols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Noto Sans Symbols1" svg:font-family="'Noto Sans Symbols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25in" fo:margin-right="0in" fo:margin-top="0in" fo:margin-bottom="0in" loext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2" style:family="paragraph" style:parent-style-name="Standard" style:list-style-name="WWNum1">
      <style:paragraph-properties fo:margin-left="0.25in" fo:margin-right="0in" fo:margin-top="0in" fo:margin-bottom="0.139in" loext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3" style:family="paragraph" style:parent-style-name="Heading_20_1" style:master-page-name="Standard">
      <style:paragraph-properties style:page-number="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mbria" fo:font-size="11pt" fo:font-style="normal" style:text-underline-style="none" fo:font-weight="normal" style:font-name-asian="Cambria1" style:font-size-asian="11pt" style:font-style-asian="normal" style:font-weight-asian="normal" style:font-name-complex="Cambria1" style:font-size-complex="11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art Waste Management System</text:p>
      <text:p text:style-name="Standard"><text:span text:style-name="T1">Project Documentation<text:line-break/></text:span></text:p>
      <text:p text:style-name="Heading_20_2">System Architecture Diagram</text:p>
      <text:p text:style-name="Standard"><text:line-break/>+------------------+<text:line-break/>| Smart Dustbins <text:s text:c="2"/>|<text:line-break/>| (Sensors: Fill, <text:s/>|<text:line-break/>| Gas, Temp) <text:s text:c="6"/>|<text:line-break/>+--------+---------+<text:line-break/> <text:s text:c="8"/>|<text:line-break/> <text:s text:c="8"/>v<text:line-break/>+------------------+<text:line-break/>| IoT Controller <text:s text:c="2"/>|<text:line-break/>| (ESP32/NodeMCU) <text:s/>|<text:line-break/>+--------+---------+<text:line-break/> <text:s text:c="8"/>|<text:line-break/> <text:s text:c="8"/>v<text:line-break/>+------------------+<text:line-break/>| Cloud Database <text:s text:c="2"/>|<text:line-break/>| &amp; Analytics <text:s text:c="5"/>|<text:line-break/>+---+----------+---+<text:line-break/> <text:s text:c="3"/>| <text:s text:c="9"/>|<text:line-break/> <text:s text:c="3"/>v <text:s text:c="9"/>v<text:line-break/>+-------+ <text:s text:c="2"/>+----------------+<text:line-break/>| Admin | <text:s text:c="2"/>| Mobile / Web <text:s text:c="2"/>|<text:line-break/>| Panel | <text:s text:c="2"/>| Dashboard <text:s text:c="5"/>|<text:line-break/>+---+---+ <text:s text:c="2"/>+--------+-------+<text:line-break/> <text:s text:c="3"/>| <text:s text:c="16"/>|<text:line-break/> <text:s text:c="3"/>+--------+--------+<text:line-break/> <text:s text:c="12"/>|<text:line-break/> <text:s text:c="12"/>v<text:line-break/>+----------------------+<text:line-break/>| Collection Routing <text:s text:c="2"/>|<text:line-break/>| &amp; Alerts System <text:s text:c="5"/>|<text:line-break/>+----------------------+<text:line-break/></text:p>
      <text:p text:style-name="Heading_20_2">Abstract</text:p>
      <text:p text:style-name="Standard">The Smart Waste Management System uses IoT-enabled waste bins to monitor fill levels and environmental conditions in real time. Sensor data is transmitted to a cloud platform where it is analyzed and displayed on dashboards. The system generates alerts and optimizes waste collection routes, reducing operational costs and improving cleanliness.</text:p>
      <text:p text:style-name="Heading_20_2">Objectives</text:p>
      <text:list xml:id="list102366481" text:style-name="WWNum1">
        <text:list-item>
          <text:p text:style-name="P1"><text:span text:style-name="T2">Monitor waste bin fill levels in real time.</text:span></text:p>
        </text:list-item>
        <text:list-item>
          <text:p text:style-name="P1"><text:span text:style-name="T2">Reduce unnecessary waste collection trips.</text:span></text:p>
        </text:list-item>
        <text:list-item>
          <text:p text:style-name="P1"><text:span text:style-name="T2">Improve city cleanliness and hygiene.</text:span></text:p>
        </text:list-item>
        <text:list-item>
          <text:p text:style-name="P1"><text:span text:style-name="T2">Provide data-driven waste management decisions.</text:span></text:p>
        </text:list-item>
        <text:list-item>
          <text:p text:style-name="P2"><text:span text:style-name="T2">Generate alerts for overflow conditions.</text:span></text:p>
        </text:list-item>
      </text:list>
      <text:p text:style-name="Heading_20_2">Modules</text:p>
      <text:list xml:id="list73615031132743" text:continue-numbering="true" text:style-name="WWNum1">
        <text:list-item>
          <text:p text:style-name="P1"><text:span text:style-name="T2">Smart Bin Sensors</text:span></text:p>
        </text:list-item>
        <text:list-item>
          <text:p text:style-name="P1"><text:span text:style-name="T2">IoT Communication Module</text:span></text:p>
        </text:list-item>
        <text:list-item>
          <text:p text:style-name="P1"><text:span text:style-name="T2">Cloud Storage and Analytics</text:span></text:p>
        </text:list-item>
        <text:list-item>
          <text:p text:style-name="P1"><text:span text:style-name="T2">Admin Dashboard</text:span></text:p>
        </text:list-item>
        <text:list-item>
          <text:p text:style-name="P1"><text:span text:style-name="T2">Mobile Application</text:span></text:p>
        </text:list-item>
        <text:list-item>
          <text:p text:style-name="P2"><text:span text:style-name="T2">Alert and Route Optimization Engin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Symbols" svg:font-family="'Noto Sans Symbols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1pt" fo:language="en" fo:country="none" style:letter-kerning="false" style:font-name-asian="Cambria1" style:font-size-asian="11pt" style:language-asian="zh" style:country-asian="CN" style:font-name-complex="Cambri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1pt" fo:language="en" fo:country="none" style:letter-kerning="false" style:font-name-asian="Cambria1" style:font-size-asian="11pt" style:language-asian="zh" style:country-asian="CN" style:font-name-complex="Cambria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in" loext:contextual-spacing="false" fo:line-height="100%" fo:keep-together="always" fo:keep-with-next="always"/>
      <style:text-properties fo:color="#366091" style:font-name="Calibri" fo:font-family="Calibri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Calibri1" style:font-family-complex="Calibri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libri" fo:font-family="Calibri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Calibri1" style:font-family-complex="Calibri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libri" fo:font-family="Calibri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libri" fo:font-family="Calibri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Calibri1" style:font-family-complex="Calibri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243f61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243f61" style:font-name="Calibri" fo:font-family="Calibri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Calibri1" style:font-family-complex="Calibri" style:font-family-generic-complex="system" style:font-pitch-complex="variable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2083in" loext:contextual-spacing="false" fo:line-height="100%" fo:padding-left="0in" fo:padding-right="0in" fo:padding-top="0in" fo:padding-bottom="0.0555in" fo:border-left="none" fo:border-right="none" fo:border-top="none" fo:border-bottom="0.99pt solid #4f81bd"/>
      <style:text-properties fo:color="#17365d" style:font-name="Calibri" fo:font-family="Calibri" style:font-family-generic="roman" style:font-pitch="variable" fo:font-size="26pt" style:font-name-asian="Calibri1" style:font-family-asian="Calibri" style:font-family-generic-asian="system" style:font-pitch-asian="variable" style:font-size-asian="26pt" style:font-name-complex="Calibri1" style:font-family-complex="Calibri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text-properties fo:color="#4f81bd" style:font-name="Calibri" fo:font-family="Calibri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name-complex="Calibri1" style:font-family-complex="Calibri" style:font-family-generic-complex="system" style:font-pitch-complex="variable" style:font-size-complex="12pt" style:font-style-complex="italic"/>
    </style:style>
    <style:style style:name="ListLabel_20_1" style:display-name="ListLabel 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Noto Sans Symbols"/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9" meta:word-count="215" meta:character-count="1458" meta:non-whitespace-character-count="1137"/>
    <meta:generator>LibreOfficeDev/6.0.5.2$Linux_X86_64 LibreOffice_project/</meta:generator>
  </office:meta>
</office:document-meta>
</file>