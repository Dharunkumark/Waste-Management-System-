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Form Development</text:p>
      <text:p text:style-name="Heading_20_2">1. Introduction</text:p>
      <text:p text:style-name="Standard">CRUD (Create, Read, Update, Delete) form development is an important part of the Waste Management System. It allows users and administrators to manage waste-related data efficiently. CRUD operations help in adding new records, viewing existing records, modifying data, and removing unwanted information.</text:p>
      <text:p text:style-name="Heading_20_2">2. Purpose of CRUD Operations</text:p>
      <text:p text:style-name="Standard">The main purpose of CRUD operations is to provide a simple interface for managing database records. It reduces manual work and improves data accuracy.</text:p>
      <text:p text:style-name="Heading_20_2">3. CRUD Operations</text:p>
      <text:p text:style-name="Standard">Create:<text:line-break/>The Create operation is used to add new data into the system.<text:line-break/>Examples:<text:line-break/>- Adding a new user<text:line-break/>- Submitting a waste report<text:line-break/>- Adding collection details<text:line-break/><text:line-break/>Read:<text:line-break/>The Read operation is used to retrieve and display stored data.<text:line-break/>Examples:<text:line-break/>- Viewing waste reports<text:line-break/>- Displaying collection status<text:line-break/>- Searching records<text:line-break/><text:line-break/>Update:<text:line-break/>The Update operation is used to modify existing information.<text:line-break/>Examples:<text:line-break/>- Updating waste report status<text:line-break/>- Editing user details<text:line-break/>- Changing collection information<text:line-break/><text:line-break/>Delete:<text:line-break/>The Delete operation is used to remove unnecessary records.<text:line-break/>Examples:<text:line-break/>- Removing incorrect reports<text:line-break/>- Deleting outdated records</text:p>
      <text:p text:style-name="Heading_20_2">4. CRUD Forms Developed</text:p>
      <text:p text:style-name="Standard">User Management Form:<text:line-break/>- Add user details<text:line-break/>- View user information<text:line-break/>- Edit user details<text:line-break/>- Delete user records<text:line-break/><text:line-break/>Waste Report Form:<text:line-break/>- Create waste complaint<text:line-break/>- View complaints<text:line-break/>- Update complaint status<text:line-break/>- Delete reports<text:line-break/><text:line-break/>Collection Management Form:<text:line-break/>- Add collection details<text:line-break/>- View collection records<text:line-break/>- Update collection status<text:line-break/>- Delete collection records</text:p>
      <text:p text:style-name="Heading_20_2">5. Benefits</text:p>
      <text:p text:style-name="Standard">- Easy data management<text:line-break/>- Faster operations<text:line-break/>- Reduces errors<text:line-break/>- Improves system efficiency<text:line-break/>- Better database control</text:p>
      <text:p text:style-name="Heading_20_2">6. Conclusion</text:p>
      <text:p text:style-name="Standard">CRUD form development helps the Waste Management System to manage all important data effectively. It provides a structured method for handling user, waste report, and collection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82" meta:character-count="1849" meta:non-whitespace-character-count="1575"/>
    <meta:generator>LibreOfficeDev/6.0.5.2$Linux_X86_64 LibreOffice_project/</meta:generator>
  </office:meta>
</office:document-meta>
</file>