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er91a6uw4a6a"/>Smart Waste Management System</text:p>
      <text:p text:style-name="Standard">Objective Definition</text:p>
      <text:p text:style-name="Heading_20_2"><text:bookmark text:name="_x64laarnlpmq"/>Definition of Objective:</text:p>
      <text:p text:style-name="Standard">An objective is a clear and specific goal that a project aims to achieve. It explains what the project intends to accomplish and helps to measure the success of the project.</text:p>
      <text:p text:style-name="Heading_20_2"><text:bookmark text:name="_e8ib11ttjn6d"/>Project Objective Definition:</text:p>
      <text:p text:style-name="Standard">The objective of the Smart Waste Management System is to develop a web-based platform that allows citizens to report waste-related issues, track complaint status, and helps administrators manage and resolve complaints efficiently. The system aims to improve communication, reduce manual work, and support better waste management.</text:p>
      <text:p text:style-name="Heading_20_3"><text:bookmark text:name="_k7h3gmg2jh1u"/>Main Objectives:</text:p>
      <text:p text:style-name="Standard"/>
      <text:p text:style-name="Standard">1.To provide an online platform for registering waste complaints.</text:p>
      <text:p text:style-name="Standard">2.To allow users to track the status of their complaints.</text:p>
      <text:p text:style-name="Standard">3.To help administrators manage waste-related issues efficiently.</text:p>
      <text:p text:style-name="Standard">4.To maintain complaint records in a centralized database.</text:p>
      <text:p text:style-name="Standard">5.To reduce manual complaint handling processes.</text:p>
      <text:p text:style-name="Standard">6.To improve cleanliness and waste management serv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38" meta:character-count="968" meta:non-whitespace-character-count="843"/>
    <meta:generator>LibreOfficeDev/6.0.5.2$Linux_X86_64 LibreOffice_project/</meta:generator>
  </office:meta>
</office:document-meta>
</file>