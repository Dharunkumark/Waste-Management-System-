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Heading_20_1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art Waste Management System</text:p>
      <text:p text:style-name="Heading_20_2">Dashboard Development</text:p>
      <text:p text:style-name="Heading_20_3">Definition</text:p>
      <text:p text:style-name="Standard">Dashboard Development is the process of designing and developing a user interface that displays important information and allows users to interact with system features easily.</text:p>
      <text:p text:style-name="Heading_20_3">User Dashboard</text:p>
      <text:p text:style-name="Standard">Purpose:<text:line-break/>The user dashboard allows citizens to submit complaints and monitor waste management requests.<text:line-break/><text:line-break/>Features:<text:line-break/>- User Profile<text:line-break/>- View and update user details<text:line-break/>- Submit waste complaint<text:line-break/>- Select waste type<text:line-break/>- Enter location<text:line-break/>- Upload waste image<text:line-break/>- Track complaint status<text:line-break/>- View complaint history</text:p>
      <text:p text:style-name="Heading_20_3">Admin Dashboard</text:p>
      <text:p text:style-name="Standard">Purpose:<text:line-break/>The admin dashboard helps authorities manage complaints and monitor the system.<text:line-break/><text:line-break/>Features:<text:line-break/>- Admin Login<text:line-break/>- View complaints<text:line-break/>- Verify complaints<text:line-break/>- Update complaint status<text:line-break/>- Manage users<text:line-break/>- Generate reports</text:p>
      <text:p text:style-name="Heading_20_3">Technologies Used</text:p>
      <text:p text:style-name="Standard">Frontend:<text:line-break/>HTML, CSS, JavaScript<text:line-break/><text:line-break/>Backend:<text:line-break/>Flask (Python)<text:line-break/><text:line-break/>Database:<text:line-break/>SQLite</text:p>
      <text:p text:style-name="Heading_20_3">Expected Output</text:p>
      <text:p text:style-name="Standard">A simple and user-friendly dashboard where users can report waste problems and admins can efficiently manage complai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366091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2083in" loext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style:font-name-asian="Calibri1" style:font-family-asian="Calibri" style:font-family-generic-asian="system" style:font-pitch-asian="variable" style:font-size-asian="26pt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text-properties fo:color="#4f81bd" style:font-name="Calibri" fo:font-family="Calibri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Calibri1" style:font-family-complex="Calibri" style:font-family-generic-complex="system" style:font-pitch-complex="variable" style:font-size-complex="12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145" meta:character-count="994" meta:non-whitespace-character-count="857"/>
    <meta:generator>LibreOfficeDev/6.0.5.2$Linux_X86_64 LibreOffice_project/</meta:generator>
  </office:meta>
</office:document-meta>
</file>