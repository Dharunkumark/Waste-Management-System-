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 Wireframe Design - Smart Waste Management System</text:p>
      <text:p text:style-name="Heading_20_2">1. Login Page Wireframe</text:p>
      <text:p text:style-name="Standard"><text:line-break/>+----------------------------------+<text:line-break/>| SMART WASTE MANAGEMENT SYSTEM <text:s text:c="3"/>|<text:line-break/>+----------------------------------+<text:line-break/>| Username: [_______________] <text:s text:c="5"/>|<text:line-break/>| Password: [_______________] <text:s text:c="5"/>|<text:line-break/>| <text:s text:c="33"/>|<text:line-break/>| <text:s text:c="5"/>[ Login Button ] <text:s text:c="11"/>|<text:line-break/>+----------------------------------+<text:line-break/></text:p>
      <text:p text:style-name="Heading_20_2">2. Admin Dashboard Wireframe</text:p>
      <text:p text:style-name="Standard"><text:line-break/>+--------------------------------------------------+<text:line-break/>| SMART WASTE MANAGEMENT DASHBOARD <text:s text:c="16"/>|<text:line-break/>+--------------------------------------------------+<text:line-break/>| Total Bins | Full Bins | Alerts | Collections <text:s text:c="3"/>|<text:line-break/>+--------------------------------------------------+<text:line-break/>| Bin ID | Location | Fill Level | Status <text:s text:c="9"/>|<text:line-break/>|--------------------------------------------------|<text:line-break/>| B001 <text:s text:c="2"/>| Area A <text:s text:c="2"/>| 85% <text:s text:c="7"/>| Full <text:s text:c="11"/>|<text:line-break/>| B002 <text:s text:c="2"/>| Area B <text:s text:c="2"/>| 40% <text:s text:c="7"/>| Normal <text:s text:c="9"/>|<text:line-break/>+--------------------------------------------------+<text:line-break/>| Alert Notifications <text:s text:c="29"/>|<text:line-break/>+--------------------------------------------------+<text:line-break/></text:p>
      <text:p text:style-name="Heading_20_2">3. Bin Monitoring Page</text:p>
      <text:p text:style-name="Standard"><text:line-break/>+------------------------------------------+<text:line-break/>| BIN MONITORING <text:s text:c="26"/>|<text:line-break/>+------------------------------------------+<text:line-break/>| Bin ID: B001 <text:s text:c="28"/>|<text:line-break/>| Location: Area A <text:s text:c="24"/>|<text:line-break/>| Fill Level: 85% <text:s text:c="25"/>|<text:line-break/>| Status: Full <text:s text:c="28"/>|<text:line-break/>| Last Updated: 10:30 AM <text:s text:c="18"/>|<text:line-break/>+------------------------------------------+<text:line-break/></text:p>
      <text:p text:style-name="Heading_20_2">4. Alerts Page</text:p>
      <text:p text:style-name="Standard"><text:line-break/>+------------------------------------------+<text:line-break/>| ALERT MANAGEMENT <text:s text:c="24"/>|<text:line-break/>+------------------------------------------+<text:line-break/>| Alert ID | Bin ID | Message <text:s text:c="13"/>|<text:line-break/>|------------------------------------------|<text:line-break/>| A001 <text:s text:c="4"/>| B001 <text:s text:c="2"/>| Bin Full <text:s text:c="12"/>|<text:line-break/>| A002 <text:s text:c="4"/>| B003 <text:s text:c="2"/>| Overflow Risk <text:s text:c="7"/>|<text:line-break/>+------------------------------------------+<text:line-break/></text:p>
      <text:p text:style-name="Heading_20_2">5. Navigation Structure</text:p>
      <text:p text:style-name="Standard"><text:line-break/>Login<text:line-break/> <text:s/>|<text:line-break/>Dashboard<text:line-break/> <text:s/>|-- Bin Monitoring<text:line-break/> <text:s/>|-- Alerts<text:line-break/> <text:s/>|-- Reports<text:line-break/> <text:s/>|-- Logout<text:line-break/></text:p>
      <text:p text:style-name="Heading_20_2">6. Conclusion</text:p>
      <text:p text:style-name="Standard">The wireframe design provides a simple user interface for monitoring waste bins, viewing alerts, and managing waste collection activ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23" meta:character-count="2095" meta:non-whitespace-character-count="1503"/>
    <meta:generator>LibreOfficeDev/6.0.5.2$Linux_X86_64 LibreOffice_project/</meta:generator>
  </office:meta>
</office:document-meta>
</file>