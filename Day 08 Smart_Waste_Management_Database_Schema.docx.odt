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base Schema Creation - Smart Waste Management System</text:p>
      <text:p text:style-name="Heading_20_2">1. Introduction</text:p>
      <text:p text:style-name="Standard">The database stores information related to smart bins, sensor readings, users, and alerts. It supports real-time monitoring and waste management operations.</text:p>
      <text:p text:style-name="Heading_20_2">2. Database Tables</text:p>
      <text:p text:style-name="Heading_20_3">Users</text:p>
      <text:list xml:id="list1626232493" text:style-name="WWNum1">
        <text:list-item>
          <text:p text:style-name="P1"><text:span text:style-name="T1">user_id (Primary Key)</text:span></text:p>
        </text:list-item>
        <text:list-item>
          <text:p text:style-name="P1"><text:span text:style-name="T1">username</text:span></text:p>
        </text:list-item>
        <text:list-item>
          <text:p text:style-name="P1"><text:span text:style-name="T1">password</text:span></text:p>
        </text:list-item>
        <text:list-item>
          <text:p text:style-name="P2"><text:span text:style-name="T1">role</text:span></text:p>
        </text:list-item>
      </text:list>
      <text:p text:style-name="Heading_20_3">Bins</text:p>
      <text:list xml:id="list73645711992428" text:continue-numbering="true" text:style-name="WWNum1">
        <text:list-item>
          <text:p text:style-name="P1"><text:span text:style-name="T1">bin_id (Primary Key)</text:span></text:p>
        </text:list-item>
        <text:list-item>
          <text:p text:style-name="P1"><text:span text:style-name="T1">location</text:span></text:p>
        </text:list-item>
        <text:list-item>
          <text:p text:style-name="P2"><text:span text:style-name="T1">status</text:span></text:p>
        </text:list-item>
      </text:list>
      <text:p text:style-name="Heading_20_3">Sensor_Data</text:p>
      <text:list xml:id="list73645789250782" text:continue-numbering="true" text:style-name="WWNum1">
        <text:list-item>
          <text:p text:style-name="P1"><text:span text:style-name="T1">data_id (Primary Key)</text:span></text:p>
        </text:list-item>
        <text:list-item>
          <text:p text:style-name="P1"><text:span text:style-name="T1">bin_id (Foreign Key)</text:span></text:p>
        </text:list-item>
        <text:list-item>
          <text:p text:style-name="P1"><text:span text:style-name="T1">fill_level</text:span></text:p>
        </text:list-item>
        <text:list-item>
          <text:p text:style-name="P2"><text:span text:style-name="T1">created_at</text:span></text:p>
        </text:list-item>
      </text:list>
      <text:p text:style-name="Heading_20_3">Alerts</text:p>
      <text:list xml:id="list73643756208745" text:continue-numbering="true" text:style-name="WWNum1">
        <text:list-item>
          <text:p text:style-name="P1"><text:span text:style-name="T1">alert_id (Primary Key)</text:span></text:p>
        </text:list-item>
        <text:list-item>
          <text:p text:style-name="P1"><text:span text:style-name="T1">bin_id (Foreign Key)</text:span></text:p>
        </text:list-item>
        <text:list-item>
          <text:p text:style-name="P1"><text:span text:style-name="T1">message</text:span></text:p>
        </text:list-item>
        <text:list-item>
          <text:p text:style-name="P2"><text:span text:style-name="T1">created_at</text:span></text:p>
        </text:list-item>
      </text:list>
      <text:p text:style-name="Heading_20_2">3. ER Diagram</text:p>
      <text:p text:style-name="Standard"><text:line-break/>USERS<text:line-break/><text:line-break/>BINS ----&lt; SENSOR_DATA<text:line-break/><text:line-break/>BINS ----&lt; ALERTS<text:line-break/></text:p>
      <text:p text:style-name="Heading_20_2"><text:soft-page-break/>4. SQL Schema</text:p>
      <text:p text:style-name="Standard"><text:line-break/>CREATE TABLE users(<text:line-break/> <text:s text:c="3"/>user_id INT PRIMARY KEY AUTO_INCREMENT,<text:line-break/> <text:s text:c="3"/>username VARCHAR(50),<text:line-break/> <text:s text:c="3"/>password VARCHAR(100),<text:line-break/> <text:s text:c="3"/>role VARCHAR(20)<text:line-break/>);<text:line-break/><text:line-break/>CREATE TABLE bins(<text:line-break/> <text:s text:c="3"/>bin_id INT PRIMARY KEY AUTO_INCREMENT,<text:line-break/> <text:s text:c="3"/>location VARCHAR(100),<text:line-break/> <text:s text:c="3"/>status VARCHAR(20)<text:line-break/>);<text:line-break/><text:line-break/>CREATE TABLE sensor_data(<text:line-break/> <text:s text:c="3"/>data_id INT PRIMARY KEY AUTO_INCREMENT,<text:line-break/> <text:s text:c="3"/>bin_id INT,<text:line-break/> <text:s text:c="3"/>fill_level INT,<text:line-break/> <text:s text:c="3"/>created_at DATETIME,<text:line-break/> <text:s text:c="3"/>FOREIGN KEY(bin_id) REFERENCES bins(bin_id)<text:line-break/>);<text:line-break/><text:line-break/>CREATE TABLE alerts(<text:line-break/> <text:s text:c="3"/>alert_id INT PRIMARY KEY AUTO_INCREMENT,<text:line-break/> <text:s text:c="3"/>bin_id INT,<text:line-break/> <text:s text:c="3"/>message VARCHAR(255),<text:line-break/> <text:s text:c="3"/>created_at DATETIME,<text:line-break/> <text:s text:c="3"/>FOREIGN KEY(bin_id) REFERENCES bins(bin_id)<text:line-break/>);<text:line-break/></text:p>
      <text:p text:style-name="Heading_20_2">5. Conclusion</text:p>
      <text:p text:style-name="Standard">This database schema provides a simple and efficient structure for a one-month Smart Waste Management System project using Python, Flask, and My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85" meta:character-count="1344" meta:non-whitespace-character-count="1128"/>
    <meta:generator>LibreOfficeDev/6.0.5.2$Linux_X86_64 LibreOffice_project/</meta:generator>
  </office:meta>
</office:document-meta>
</file>