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n and Dashboard UI Design</text:p>
      <text:p text:style-name="Standard">Project: Smart Waste Management System</text:p>
      <text:p text:style-name="Heading_20_2">1. Login UI Design</text:p>
      <text:p text:style-name="Standard"><text:line-break/>┌──────────────────────────────────────────────┐<text:line-break/>│ <text:s text:c="9"/>SMART WASTE MANAGEMENT <text:s text:c="13"/>│<text:line-break/>├──────────────────────────────────────────────┤<text:line-break/>│ Username <text:s text:c="36"/>│<text:line-break/>│ [____________________________] <text:s text:c="13"/>│<text:line-break/>│ <text:s text:c="45"/>│<text:line-break/>│ Password <text:s text:c="36"/>│<text:line-break/>│ [____________________________] <text:s text:c="13"/>│<text:line-break/>│ <text:s text:c="45"/>│<text:line-break/>│ <text:s text:c="11"/>[ LOGIN ] <text:s text:c="24"/>│<text:line-break/>└──────────────────────────────────────────────┘<text:line-break/></text:p>
      <text:p text:style-name="Standard">Design Features:</text:p>
      <text:list xml:id="list1145942290" text:style-name="WWNum1">
        <text:list-item>
          <text:p text:style-name="P1"><text:span text:style-name="T1">Green theme for eco-friendly appearance</text:span></text:p>
        </text:list-item>
        <text:list-item>
          <text:p text:style-name="P1"><text:span text:style-name="T1">Responsive login form</text:span></text:p>
        </text:list-item>
        <text:list-item>
          <text:p text:style-name="P1"><text:span text:style-name="T1">Secure username and password fields</text:span></text:p>
        </text:list-item>
        <text:list-item>
          <text:p text:style-name="P2"><text:span text:style-name="T1">Login validation support</text:span></text:p>
        </text:list-item>
      </text:list>
      <text:p text:style-name="Heading_20_2">2. Dashboard UI Design</text:p>
      <text:p text:style-name="Standard"><text:line-break/>┌──────────────────────────────────────────────────────────┐<text:line-break/>│ SMART WASTE MANAGEMENT SYSTEM <text:s text:c="15"/>Admin ▼ <text:s text:c="4"/>│<text:line-break/>├──────────────────────────────────────────────────────────┤<text:line-break/>│ Dashboard | Bins | Alerts | Reports | Logout <text:s text:c="11"/>│<text:line-break/>├──────────────────────────────────────────────────────────┤<text:line-break/>│ Total Bins | Full Bins | Alerts | Waste Collected <text:s text:c="6"/>│<text:line-break/>│ <text:s text:c="4"/>50 <text:s text:c="4"/>| <text:s text:c="4"/>8 <text:s text:c="4"/>| <text:s text:c="2"/>5 <text:s text:c="3"/>| <text:s text:c="5"/>1 Ton <text:s text:c="11"/>│<text:line-break/>├──────────────────────────────────────────────────────────┤<text:line-break/>│ Bin Monitoring <text:s text:c="42"/>│<text:line-break/>├──────────────────────────────────────────────────────────┤<text:line-break/>│ Bin ID | Location | Fill Level | Status <text:s text:c="16"/>│<text:line-break/>│ B001 <text:s text:c="2"/>| Area A <text:s text:c="2"/>| 85% <text:s text:c="7"/>| Full <text:s text:c="18"/>│<text:line-break/>│ B002 <text:s text:c="2"/>| Area B <text:s text:c="2"/>| 40% <text:s text:c="7"/>| Normal <text:s text:c="16"/>│<text:line-break/>│ B003 <text:s text:c="2"/>| Area C <text:s text:c="2"/>| 70% <text:s text:c="7"/>| Warning <text:s text:c="15"/>│<text:line-break/>├──────────────────────────────────────────────────────────┤<text:line-break/>│ Recent Alerts <text:s text:c="43"/>│<text:line-break/>│ • Bin B001 is Full <text:s text:c="38"/>│<text:line-break/>│ • Bin B003 nearing capacity <text:s text:c="29"/>│<text:line-break/>└──────────────────────────────────────────────────────────┘<text:line-break/></text:p>
      <text:p text:style-name="Heading_20_2">Dashboard Components</text:p>
      <text:list xml:id="list73726437521763" text:continue-numbering="true" text:style-name="WWNum1">
        <text:list-item>
          <text:p text:style-name="P1"><text:span text:style-name="T1">Navigation Bar</text:span></text:p>
        </text:list-item>
        <text:list-item>
          <text:p text:style-name="P1"><text:span text:style-name="T1">Statistics Cards</text:span></text:p>
        </text:list-item>
        <text:list-item>
          <text:p text:style-name="P1"><text:span text:style-name="T1">Bin Monitoring Table</text:span></text:p>
        </text:list-item>
        <text:list-item>
          <text:p text:style-name="P1"><text:span text:style-name="T1">Alert Notification Panel</text:span></text:p>
        </text:list-item>
        <text:list-item>
          <text:p text:style-name="P1"><text:span text:style-name="T1">Reports Section</text:span></text:p>
        </text:list-item>
        <text:list-item>
          <text:p text:style-name="P2"><text:span text:style-name="T1">Logout Button</text:span></text:p>
        </text:list-item>
      </text:list>
      <text:p text:style-name="Heading_20_2">Color Scheme</text:p>
      <text:p text:style-name="Standard"><text:line-break/>Primary Color: Green<text:line-break/>Background: Light Gray<text:line-break/>Normal Status: Green<text:line-break/>Warning Status: Orange<text:line-break/>Full Status: Red<text:line-break/></text:p>
      <text:p text:style-name="Heading_20_2">Conclusion</text:p>
      <text:p text:style-name="Standard">The Login and Dashboard UI design provides an easy-to-use interface for monitoring smart bins, viewing alerts, and managing waste collection activ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241" meta:character-count="2345" meta:non-whitespace-character-count="1562"/>
    <meta:generator>LibreOfficeDev/6.0.5.2$Linux_X86_64 LibreOffice_project/</meta:generator>
  </office:meta>
</office:document-meta>
</file>