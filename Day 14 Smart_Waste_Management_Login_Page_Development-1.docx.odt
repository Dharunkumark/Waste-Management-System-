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in Page Development</text:p>
      <text:p text:style-name="Standard">Project: Smart Waste Management System</text:p>
      <text:p text:style-name="Heading_20_2">1. Objective</text:p>
      <text:p text:style-name="Standard">The Login Page provides secure access to the Smart Waste Management System.</text:p>
      <text:p text:style-name="Heading_20_2">2. Login Page Features</text:p>
      <text:list xml:id="list495052669" text:style-name="WWNum1">
        <text:list-item>
          <text:p text:style-name="P1"><text:span text:style-name="T1">Username Field</text:span></text:p>
        </text:list-item>
        <text:list-item>
          <text:p text:style-name="P1"><text:span text:style-name="T1">Password Field</text:span></text:p>
        </text:list-item>
        <text:list-item>
          <text:p text:style-name="P1"><text:span text:style-name="T1">Login Button</text:span></text:p>
        </text:list-item>
        <text:list-item>
          <text:p text:style-name="P1"><text:span text:style-name="T1">Input Validation</text:span></text:p>
        </text:list-item>
        <text:list-item>
          <text:p text:style-name="P1"><text:span text:style-name="T1">Error Message Display</text:span></text:p>
        </text:list-item>
        <text:list-item>
          <text:p text:style-name="P2"><text:span text:style-name="T1">Secure Authentication</text:span></text:p>
        </text:list-item>
      </text:list>
      <text:p text:style-name="Heading_20_2">3. Login Page Layout</text:p>
      <text:p text:style-name="Standard"><text:line-break/>SMART WASTE MANAGEMENT SYSTEM<text:line-break/><text:line-break/>Username : [______________]<text:line-break/>Password : [______________]<text:line-break/><text:line-break/> <text:s text:c="5"/>[ LOGIN ]<text:line-break/></text:p>
      <text:p text:style-name="Heading_20_2">4. Technologies Used</text:p>
      <text:p text:style-name="Standard">Python, Flask, HTML, CSS, Bootstrap, MySQL</text:p>
      <text:p text:style-name="Heading_20_2">5. Sample HTML Form</text:p>
      <text:p text:style-name="Standard"><text:line-break/>&lt;form method="POST"&gt;<text:line-break/>&lt;input type="text" name="username"&gt;<text:line-break/>&lt;input type="password" name="password"&gt;<text:line-break/>&lt;button&gt;Login&lt;/button&gt;<text:line-break/>&lt;/form&gt;<text:line-break/></text:p>
      <text:p text:style-name="Heading_20_2">6. Flask Login Logic</text:p>
      <text:p text:style-name="Standard"><text:line-break/>@app.route('/login', methods=['GET','POST'])<text:line-break/>def login():<text:line-break/> <text:s text:c="3"/>pass<text:line-break/></text:p>
      <text:p text:style-name="Heading_20_2">7. Expected Result</text:p>
      <text:p text:style-name="Standard">Valid users are redirected to the dashboard after successful log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107" meta:character-count="781" meta:non-whitespace-character-count="683"/>
    <meta:generator>LibreOfficeDev/6.0.5.2$Linux_X86_64 LibreOffice_project/</meta:generator>
  </office:meta>
</office:document-meta>
</file>