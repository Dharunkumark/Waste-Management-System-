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Waste Management System</text:p>
      <text:p text:style-name="Heading_20_2">Requirement Gathering</text:p>
      <text:p text:style-name="Standard"><text:line-break/>1. Project Purpose:<text:line-break/>The purpose of the Smart Waste Management System is to create a digital platform where users can report waste-related problems and administrators can manage complaints efficiently.</text:p>
      <text:p text:style-name="Standard">2. Problem Identification:<text:line-break/>- Manual reporting of waste issues<text:line-break/>- No proper complaint tracking system<text:line-break/>- Delay in cleaning process<text:line-break/>- Difficulty maintaining records</text:p>
      <text:p text:style-name="Standard">3. Stakeholders:<text:line-break/>User/Citizen:<text:line-break/>- Report waste problems<text:line-break/>- Track complaint status</text:p>
      <text:p text:style-name="Standard">Admin/Cleaning Team:<text:line-break/>- View complaints<text:line-break/>- Update complaint status</text:p>
      <text:p text:style-name="Standard">4. Functional Requirements:</text:p>
      <text:p text:style-name="Standard">User Module:<text:line-break/>- User registration<text:line-break/>- User login<text:line-break/>- Submit complaint<text:line-break/>- Add location, waste type and description<text:line-break/>- Track complaint status</text:p>
      <text:p text:style-name="Standard">Admin Module:<text:line-break/>- Admin login<text:line-break/>- View all complaints<text:line-break/>- Update complaint status</text:p>
      <text:p text:style-name="Standard">Complaint Status:<text:line-break/>- Pending<text:line-break/>- Processing<text:line-break/>- Completed</text:p>
      <text:p text:style-name="Standard">5. Non Functional Requirements:<text:line-break/>- Good performance<text:line-break/>- Secure user data<text:line-break/>- Easy to use interface<text:line-break/>- Reliable data storage</text:p>
      <text:p text:style-name="Standard">6. Hardware Requirements:<text:line-break/>- Laptop/Computer<text:line-break/>- Minimum 4GB RAM</text:p>
      <text:p text:style-name="Standard">7. Software Requirements:<text:line-break/>Frontend:<text:line-break/>- HTML<text:line-break/>- CSS<text:line-break/>- JavaScript</text:p>
      <text:p text:style-name="Standard">Backend:<text:line-break/>- Python Flask</text:p>
      <text:p text:style-name="Standard">Database:<text:line-break/>- SQLite</text:p>
      <text:p text:style-name="Standard">Tools:<text:line-break/>- VS Code</text:p>
      <text:p text:style-name="Standard">8. Expected Output:<text:line-break/>A working web application where users submit waste complaints and admins manage and update complaint statu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94" meta:character-count="1265" meta:non-whitespace-character-count="1086"/>
    <meta:generator>LibreOfficeDev/6.0.5.2$Linux_X86_64 LibreOffice_project/</meta:generator>
  </office:meta>
</office:document-meta>
</file>