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1.ttf" xlink:type="simple">
          <svg:font-face-format svg:string="truetype"/>
        </svg:font-face-uri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5.ttf" xlink:type="simple">
          <svg:font-face-format svg:string="truetype"/>
        </svg:font-face-uri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</svg:font-face-src>
    </style:font-face>
  </office:font-face-decls>
  <office:automatic-styles>
    <style:style style:name="P1" style:family="paragraph" style:parent-style-name="Title" style:master-page-name="Standard">
      <style:paragraph-properties style:page-number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_iees7wx31ahg"/>Smart Waste Management System</text:p>
      <text:p text:style-name="Title"><text:bookmark text:name="_lgm9yqqz0qio"/>Database Requirement Analysis</text:p>
      <text:p text:style-name="Subtitle"><text:bookmark text:name="_q8pxq88s42uy"/>Definition</text:p>
      <text:p text:style-name="Standard">Database Requirement Analysis is the process of identifying the data required by the system, how it is stored, and how different data items are connected.</text:p>
      <text:p text:style-name="Heading_20_2"><text:bookmark text:name="_tul44fpdx3pk"/>Purpose</text:p>
      <text:p text:style-name="Heading_20_2"><text:bookmark text:name="_6imx6nm3lfh6"/>The purpose of the database is to store and manage user details, complaint details, and status information efficiently.</text:p>
      <text:p text:style-name="Heading_20_1"><text:bookmark text:name="_88ss7zhrw8mp"/>Database Requirements</text:p>
      <text:p text:style-name="Standard">1. User Information</text:p>
      <text:p text:style-name="Standard">The system stores user details.</text:p>
      <text:p text:style-name="Standard">Fields:</text:p>
      <text:p text:style-name="Standard">User_ID</text:p>
      <text:p text:style-name="Standard">Name</text:p>
      <text:p text:style-name="Standard">Email</text:p>
      <text:p text:style-name="Standard">Password</text:p>
      <text:p text:style-name="Standard">Phone</text:p>
      <text:p text:style-name="Standard">2. Complaint Information</text:p>
      <text:p text:style-name="Standard">The system stores waste complaint details.</text:p>
      <text:p text:style-name="Standard">Fields:</text:p>
      <text:p text:style-name="Standard">Complaint_ID</text:p>
      <text:p text:style-name="Standard">User_ID</text:p>
      <text:p text:style-name="Standard">Location</text:p>
      <text:p text:style-name="Standard">Waste_Type</text:p>
      <text:p text:style-name="Standard">Description</text:p>
      <text:p text:style-name="Standard">Image</text:p>
      <text:p text:style-name="Standard">Date</text:p>
      <text:p text:style-name="Standard"><text:soft-page-break/>Status</text:p>
      <text:p text:style-name="Standard">3. Admin Information</text:p>
      <text:p text:style-name="Standard">The system stores admin details.</text:p>
      <text:p text:style-name="Standard">Fields:</text:p>
      <text:p text:style-name="Standard">Admin_ID</text:p>
      <text:p text:style-name="Standard">Username</text:p>
      <text:p text:style-name="Standard">Password</text:p>
      <text:p text:style-name="Standard">Database Tables</text:p>
      <text:p text:style-name="Standard">Users Table</text:p>
      <text:p text:style-name="Standard">User_ID (Primary Key)</text:p>
      <text:p text:style-name="Standard">Name</text:p>
      <text:p text:style-name="Standard">Email</text:p>
      <text:p text:style-name="Standard">Password</text:p>
      <text:p text:style-name="Standard">Phone</text:p>
      <text:p text:style-name="Standard">Complaints Table</text:p>
      <text:p text:style-name="Standard">Complaint_ID (Primary Key)</text:p>
      <text:p text:style-name="Standard">User_ID (Foreign Key)</text:p>
      <text:p text:style-name="Standard">Location</text:p>
      <text:p text:style-name="Standard">Waste_Type</text:p>
      <text:p text:style-name="Standard">Description</text:p>
      <text:p text:style-name="Standard">Image</text:p>
      <text:p text:style-name="Standard">Date</text:p>
      <text:p text:style-name="Standard">Status</text:p>
      <text:p text:style-name="Standard">Admin Table</text:p>
      <text:p text:style-name="Standard">Admin_ID (Primary Key)</text:p>
      <text:p text:style-name="Standard">Username</text:p>
      <text:p text:style-name="Standard"><text:soft-page-break/>Password</text:p>
      <text:p text:style-name="Heading_20_2"><text:bookmark text:name="_bory11ydae48"/>Relationships</text:p>
      <text:p text:style-name="Standard">One user can submit many complaints.</text:p>
      <text:p text:style-name="Standard">Admin manages complaints.</text:p>
      <text:p text:style-name="Heading_20_1"><text:bookmark text:name="_hkf29d8owxv"/>Database Used</text:p>
      <text:p text:style-name="Standard">SQLite Database is used because it is simple, lightweight, easy to integrate with Flask, and suitable for a college-level projec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 style:font-style-complex="italic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 style:font-style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3" meta:paragraph-count="57" meta:word-count="162" meta:character-count="1116" meta:non-whitespace-character-count="1011"/>
    <meta:generator>LibreOfficeDev/6.0.5.2$Linux_X86_64 LibreOffice_project/</meta:generator>
  </office:meta>
</office:document-meta>
</file>