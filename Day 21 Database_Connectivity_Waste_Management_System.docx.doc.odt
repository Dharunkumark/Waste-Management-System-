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 Connectivity - Waste Management System</text:p>
      <text:p text:style-name="Standard"><text:span text:style-name="T1">Database Name: </text:span>waste_management<text:line-break/></text:p>
      <text:p text:style-name="Heading_20_2">Overview</text:p>
      <text:p text:style-name="Standard">The Waste Management System uses a database to store user details, smart dustbin information, and waste collection records. Python connects to the database using SQLite or MySQL Connector.</text:p>
      <text:p text:style-name="Heading_20_2">Tables</text:p>
      <text:p text:style-name="Heading_20_3">Users</text:p>
      <text:list xml:id="list1259412808" text:style-name="WWNum1">
        <text:list-item>
          <text:p text:style-name="P1"><text:span text:style-name="T2">user_id (Primary Key)</text:span></text:p>
        </text:list-item>
        <text:list-item>
          <text:p text:style-name="P1"><text:span text:style-name="T2">name</text:span></text:p>
        </text:list-item>
        <text:list-item>
          <text:p text:style-name="P1"><text:span text:style-name="T2">phone</text:span></text:p>
        </text:list-item>
        <text:list-item>
          <text:p text:style-name="P2"><text:span text:style-name="T2">address</text:span></text:p>
        </text:list-item>
      </text:list>
      <text:p text:style-name="Heading_20_3">Dustbin</text:p>
      <text:list xml:id="list74736251632441" text:continue-numbering="true" text:style-name="WWNum1">
        <text:list-item>
          <text:p text:style-name="P1"><text:span text:style-name="T2">bin_id (Primary Key)</text:span></text:p>
        </text:list-item>
        <text:list-item>
          <text:p text:style-name="P1"><text:span text:style-name="T2">location</text:span></text:p>
        </text:list-item>
        <text:list-item>
          <text:p text:style-name="P1"><text:span text:style-name="T2">waste_type</text:span></text:p>
        </text:list-item>
        <text:list-item>
          <text:p text:style-name="P1"><text:span text:style-name="T2">fill_level</text:span></text:p>
        </text:list-item>
        <text:list-item>
          <text:p text:style-name="P2"><text:span text:style-name="T2">status</text:span></text:p>
        </text:list-item>
      </text:list>
      <text:p text:style-name="Heading_20_3">Waste Collection</text:p>
      <text:list xml:id="list74735076527718" text:continue-numbering="true" text:style-name="WWNum1">
        <text:list-item>
          <text:p text:style-name="P1"><text:span text:style-name="T2">collection_id (Primary Key)</text:span></text:p>
        </text:list-item>
        <text:list-item>
          <text:p text:style-name="P1"><text:span text:style-name="T2">bin_id (Foreign Key)</text:span></text:p>
        </text:list-item>
        <text:list-item>
          <text:p text:style-name="P1"><text:span text:style-name="T2">collection_date</text:span></text:p>
        </text:list-item>
        <text:list-item>
          <text:p text:style-name="P1"><text:span text:style-name="T2">collector_name</text:span></text:p>
        </text:list-item>
        <text:list-item>
          <text:p text:style-name="P2"><text:span text:style-name="T2">status</text:span></text:p>
        </text:list-item>
      </text:list>
      <text:p text:style-name="Heading_20_2">Python Database Connection</text:p>
      <text:p text:style-name="Standard">import sqlite3<text:line-break/><text:line-break/>conn = sqlite3.connect("waste_management.db")<text:line-break/>cursor = conn.cursor()<text:line-break/><text:line-break/>print("Database Connected Successfully")</text:p>
      <text:p text:style-name="Heading_20_2">Purpose</text:p>
      <text:list xml:id="list74736756596124" text:continue-numbering="true" text:style-name="WWNum1">
        <text:list-item>
          <text:p text:style-name="P1"><text:soft-page-break/><text:span text:style-name="T2">Stores user details</text:span></text:p>
        </text:list-item>
        <text:list-item>
          <text:p text:style-name="P1"><text:span text:style-name="T2">Maintains dustbin information</text:span></text:p>
        </text:list-item>
        <text:list-item>
          <text:p text:style-name="P1"><text:span text:style-name="T2">Records waste collection history</text:span></text:p>
        </text:list-item>
        <text:list-item>
          <text:p text:style-name="P1"><text:span text:style-name="T2">Updates bin status</text:span></text:p>
        </text:list-item>
        <text:list-item>
          <text:p text:style-name="P2"><text:span text:style-name="T2">Generates repor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14" meta:character-count="775" meta:non-whitespace-character-count="707"/>
    <meta:generator>LibreOfficeDev/6.0.5.2$Linux_X86_64 LibreOffice_project/</meta:generator>
  </office:meta>
</office:document-meta>
</file>